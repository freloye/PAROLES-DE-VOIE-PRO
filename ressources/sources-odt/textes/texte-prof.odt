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00000004008B579C21.png"/>
  <manifest:file-entry manifest:media-type="image/png" manifest:full-path="Pictures/100002010000040000000400BACE257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Sitka Banner Semibold" svg:font-family="'Sitka Banner Semibol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style:font-name="Sitka Banner Semibold"/>
    </style:style>
    <style:style style:name="P2" style:family="paragraph" style:parent-style-name="Text_20_body">
      <style:text-properties style:font-name="Sitka Banner Semibold"/>
    </style:style>
    <style:style style:name="T1" style:family="text">
      <style:text-properties style:font-name="Sitka Banner Semibold"/>
    </style:style>
    <style:style style:name="T2" style:family="text">
      <style:text-properties style:font-name="Sitka Banner Semibold" fo:font-size="18pt" style:font-size-asian="18pt" style:font-size-complex="1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images2" text:anchor-type="paragraph" svg:x="6.6cm" svg:y="-1.249cm" svg:width="5.962cm" svg:height="5.819cm" draw:z-index="0"><draw:image xlink:href="Pictures/100002010000040000000400BACE257F.png" xlink:type="simple" xlink:show="embed" xlink:actuate="onLoad"/></draw:frame><text:span text:style-name="Strong_20_Emphasis"><text:span text:style-name="T2">La voix du professeur</text:span></text:span></text:h>
      <text:h text:style-name="Heading_20_2" text:outline-level="2">Couplet 1</text:h>
      <text:p text:style-name="Text_20_body">Tout est dit, tout est clair, affiché sur les murs.<text:line-break/>Les règles sont connues, propres, carrées, bien sûres.</text:p>
      <text:p text:style-name="Text_20_body">Je les répète encore, comme un vieux rituel,<text:line-break/>Pendant qu'en face ça s'organise en système parallèle.</text:p>
      <text:h text:style-name="Heading_20_2" text:outline-level="2">Couplet 2</text:h>
      <text:p text:style-name="Text_20_body">Il n'y a pas de malentendu, il n'y a pas de flou, pas d'erreur.<text:line-break/>Ils savent exactement jusqu'où va la peur.</text:p>
      <text:p text:style-name="Text_20_body">Je pose le cadre tranquille, je le tiens du mieux que je peux.<text:line-break/>Mais en face, il y a la meute qui décide un peu mieux.</text:p>
      <text:h text:style-name="Heading_20_2" text:outline-level="2">Refrain</text:h>
      <text:p text:style-name="Text_20_body">Ce n'est pas qu'on ne dit rien, c'est qu'on ne peut rien faire.<text:line-break/>Entre ce qu'on annonce et ce qu'on tolère,</text:p>
      <text:p text:style-name="Text_20_body">Il y a un monde entier qui s'est installé,<text:line-break/>Où la règle est fragile et la meute organisée.</text:p>
      <text:h text:style-name="Heading_20_2" text:outline-level="2">Couplet 3</text:h>
      <text:p text:style-name="Text_20_body">Et moi j'use ma voix, j'use mes journées,<text:line-break/>À rappeler l'évidence qu'ils ont déjà testée.</text:p>
      <text:p text:style-name="Text_20_body">Ce n'est pas qu'ils ne comprennent pas,<text:line-break/>C'est qu'ils ont choisi leur propre loi, leur propre vie.</text:p>
      <text:p text:style-name="Text_20_body">Y a ceux qui mènent le jeu, qui testent jusqu'au bout.<text:line-break/>Ceux qui rient un peu fort pour exister surtout.</text:p>
      <text:p text:style-name="Text_20_body">Y a ceux qui suivent derrière sans trop savoir pourquoi,<text:line-break/>Qui glissent doucement là où ça dérape déjà.</text:p>
      <text:h text:style-name="Heading_20_2" text:outline-level="2">Couplet 4</text:h>
      <text:p text:style-name="Text_20_body">Et puis y a les largués, perdus dans les mots,<text:line-break/>Qui décrochent à la phrase avant même le tableau.</text:p>
      <text:p text:style-name="Text_20_body">Ils attrapent un mot sur deux, le reste s'efface.<text:line-break/>Alors ils font semblant pour garder la face.</text:p>
      <text:h text:style-name="Heading_20_2" text:outline-level="2">Refrain</text:h>
      <text:p text:style-name="Text_20_body">Ce n'est pas qu'on ne dit rien, c'est qu'on ne peut rien faire.<text:line-break/>Entre ce qu'on annonce et ce qu'on tolère,</text:p>
      <text:p text:style-name="Text_20_body">Il y a un monde entier qui s'est installé,<text:line-break/>Où la règle est fragile et la meute organisée.</text:p>
      <text:p text:style-name="Text_20_body">Et moi j'use ma voix, j'use mes journées,<text:line-break/>À rappeler l'évidence qu'ils ont déjà testée.</text:p>
      <text:p text:style-name="Text_20_body">Ce n'est pas qu'ils ne comprennent pas,<text:line-break/>C'est qu'ils ont choisi leur propre loi, leur propre vie.</text:p>
      <text:h text:style-name="Heading_20_2" text:outline-level="2">Couplet 5</text:h>
      <text:p text:style-name="Text_20_body">Et puis ça monte d'un coup, pour presque rien au départ.<text:line-break/>Un mot, un regard, et tout s'écarte.</text:p>
      <text:p text:style-name="Text_20_body">Le ton qui grimpe, les voix qui s'ajoutent,<text:line-break/>Et la salle entière qui bascule en route.</text:p>
      <text:p text:style-name="Text_20_body">J'essaie d'isoler, de calmer, de faire sortir.<text:line-break/>Mais il faut traverser la classe et ça ne fait qu'empirer.</text:p>
      <text:p text:style-name="Text_20_body">Ça crie, ça provoque, ça attise en passant.<text:line-break/>Et chaque mot rajoute encore un cran.</text:p>
      <text:h text:style-name="Heading_20_2" text:outline-level="2"><text:soft-page-break/>Couplet 6</text:h>
      <text:p text:style-name="Text_20_body">Une trousse qui part, puis les chaises qui volent.<text:line-break/>En quelques secondes, plus rien ne contrôle.</text:p>
      <text:p text:style-name="Text_20_body">Et moi au milieu, à tenter de tenir,<text:line-break/>Quand tout ce qui m'entoure cherche à s'ouvrir.</text:p>
      <text:h text:style-name="Heading_20_2" text:outline-level="2">Couplet 7</text:h>
      <text:p text:style-name="Text_20_body">On fait des réunions, on écrit des rapports.<text:line-break/>On ajuste les mots pour éviter le tort.</text:p>
      <text:p text:style-name="Text_20_body">On cherche des réponses dans des cadres trop étroits,<text:line-break/>Mais même le système ne sait plus trop pourquoi.</text:p>
      <text:p text:style-name="Text_20_body">J'attends du soutien, quelqu'un qui monte.<text:line-break/>Mais rien ne vient, personne ne compte.</text:p>
      <text:p text:style-name="Text_20_body">On me dit de gérer avec ce que j'ai là.<text:line-break/>Alors je fais face, mais je suis seul à ce moment-là.</text:p>
      <text:h text:style-name="Heading_20_2" text:outline-level="2">Couplet 8</text:h>
      <text:p text:style-name="Text_20_body">Il laisse faire un peu parce qu'il tient comme ça.<text:line-break/>Pas par choix, pas par lâcheté, juste parce qu'il n'y arrive pas.</text:p>
      <text:p text:style-name="Text_20_body">Et nous, on colmate avec ce qu'on a :<text:line-break/>Un peu de voix, un peu de foi et beaucoup de bras.</text:p>
      <text:h text:style-name="Heading_20_2" text:outline-level="2">Refrain final</text:h>
      <text:p text:style-name="Text_20_body">Ce n'est pas qu'on ne dit rien, c'est qu'on ne peut plus agir,<text:line-break/>Sans devoir expliquer, sans devoir ralentir.</text:p>
      <text:p text:style-name="Text_20_body">Et pendant qu'on ajuste, qu'on nuance, qu'on attend,<text:line-break/>La meute avance tranquillement.</text:p>
      <text:h text:style-name="Heading_20_2" text:outline-level="2">Outro</text:h>
      <text:p text:style-name="Text_20_body">Et au fond de la salle, y en a quelques-uns<text:line-break/>Qui voudraient bien suivre mais n'y arrivent plus vraiment.</text:p>
      <text:p text:style-name="Text_20_body">Alors je reste là pour eux, malgré tout ça,<text:line-break/>À tenir debout, encore une fois.</text:p>
      <text:p text:style-name="Text_20_body"><draw:frame draw:style-name="fr1" draw:name="images1" text:anchor-type="paragraph" svg:x="2.201cm" svg:y="7.724cm" svg:width="8.618cm" svg:height="5.713cm" draw:z-index="1"><draw:image xlink:href="Pictures/1000000000000600000004008B579C21.png" xlink:type="simple" xlink:show="embed" xlink:actuate="onLoad"/></draw:frame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Sitka Banner Semibold" svg:font-family="'Sitka Banner Semibol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23cm" fo:margin-bottom="2cm" fo:margin-left="2cm" fo:margin-right="2cm" style:writing-mode="lr-tb" style:footnote-max-height="0cm">
        <style:columns fo:column-count="2" fo:column-gap="0cm">
          <style:column style:rel-width="7285*" fo:start-indent="0cm" fo:end-indent="0cm"/>
          <style:column style:rel-width="7285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ED LOYE</meta:initial-creator>
    <meta:creation-date>2026-06-01T08:55:33.43</meta:creation-date>
    <dc:date>2026-06-01T09:07:17.15</dc:date>
    <dc:creator>FRED LOYE</dc:creator>
    <meta:editing-duration>PT11M43S</meta:editing-duration>
    <meta:editing-cycles>2</meta:editing-cycles>
    <meta:generator>OpenOffice/4.1.15$Win32 OpenOffice.org_project/4115m2$Build-9813</meta:generator>
    <meta:printed-by>FRED LOYE</meta:printed-by>
    <meta:print-date>2026-06-01T09:02:44.83</meta:print-date>
    <meta:document-statistic meta:table-count="0" meta:image-count="2" meta:object-count="0" meta:page-count="2" meta:paragraph-count="45" meta:word-count="597" meta:character-count="3183"/>
  </office:meta>
</office:document-meta>
</file>