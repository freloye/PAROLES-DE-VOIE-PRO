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8B579C21.png"/>
  <manifest:file-entry manifest:media-type="image/png" manifest:full-path="Pictures/100002010000040000000400BACE25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Sitka Banner Semibold" svg:font-family="'Sitka Banner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s2" text:anchor-type="paragraph" svg:x="-0.852cm" svg:y="-0.085cm" svg:width="5.542cm" svg:height="5.442cm" draw:z-index="1"><draw:image xlink:href="Pictures/100002010000040000000400BACE257F.png" xlink:type="simple" xlink:show="embed" xlink:actuate="onLoad"/></draw:frame> <text:s text:c="14"/></text:h>
      <text:p text:style-name="Text_20_body"/>
      <text:p text:style-name="Text_20_body"/>
      <text:h text:style-name="Heading_20_2" text:outline-level="2">14h00 – 14h10 Ouverture</text:h>
      <text:p text:style-name="Text_20_body">Fred</text:p>
      <text:list xml:id="list5762424205110692304" text:style-name="L2">
        <text:list-item>
          <text:p text:style-name="P1">Une même situation.</text:p>
        </text:list-item>
        <text:list-item>
          <text:p text:style-name="P1">Plusieurs regards.</text:p>
        </text:list-item>
        <text:list-item>
          <text:p text:style-name="P1">Rendre l'invisible visible.</text:p>
        </text:list-item>
      </text:list>
      <text:h text:style-name="Heading_20_1" text:outline-level="1">14h10 – 14h20</text:h>
      <text:h text:style-name="Heading_20_2" text:outline-level="2">Chansons PRISMELEC</text:h>
      <text:p text:style-name="Text_20_body">Collectif</text:p>
      <text:list xml:id="list3242085129872260813" text:style-name="L3">
        <text:list-item>
          <text:p text:style-name="P2">Élève</text:p>
        </text:list-item>
        <text:list-item>
          <text:p text:style-name="P2">Professeur</text:p>
        </text:list-item>
      </text:list>
      <text:p text:style-name="Text_20_body">Questions :</text:p>
      <text:p text:style-name="Quotations">Est-ce la même histoire ?</text:p>
      <text:p text:style-name="Quotations">Pourquoi n'entend-on pas la même chose ?</text:p>
      <text:h text:style-name="Heading_20_1" text:outline-level="1">14h20 – 14h55</text:h>
      <text:h text:style-name="Heading_20_2" text:outline-level="2">Rotation 1</text:h>
      <text:h text:style-name="Heading_20_3" text:outline-level="3">Salle Fred</text:h>
      <text:p text:style-name="Text_20_body">PRISMELEC</text:p>
      <text:p text:style-name="Text_20_body">12 élèves</text:p>
      <text:p text:style-name="Text_20_body">Situations :</text:p>
      <text:list xml:id="list2157737762566744016" text:style-name="L4">
        <text:list-item>
          <text:p text:style-name="P3">Retard</text:p>
        </text:list-item>
        <text:list-item>
          <text:p text:style-name="P3">Téléphone</text:p>
        </text:list-item>
        <text:list-item>
          <text:p text:style-name="P3">Élève discret</text:p>
        </text:list-item>
        <text:list-item>
          <text:p text:style-name="P3">Rappel de la règle</text:p>
        </text:list-item>
        <text:list-item>
          <text:p text:style-name="P3">Incident qui monte</text:p>
        </text:list-item>
        <text:list-item>
          <text:p text:style-name="P3">Chaises qui volent</text:p>
        </text:list-item>
      </text:list>
      <text:p text:style-name="Text_20_body">Questions :</text:p>
      <text:list xml:id="list158871288579627270" text:style-name="L5">
        <text:list-item>
          <text:p text:style-name="P4">Que voit l'élève ?</text:p>
        </text:list-item>
        <text:list-item>
          <text:p text:style-name="P4">Que voit le professeur ?</text:p>
        </text:list-item>
        <text:list-item>
          <text:p text:style-name="P4">Que ne voit pas l'autre ?</text:p>
        </text:list-item>
      </text:list>
      <text:p text:style-name="Text_20_body"/>
      <text:p text:style-name="Text_20_body"/>
      <text:h text:style-name="Heading_20_3" text:outline-level="3"/>
      <text:p text:style-name="Text_20_body"/>
      <text:h text:style-name="Heading_20_3" text:outline-level="3"><text:soft-page-break/>14h20 – 14h55Salle Mickaël</text:h>
      <text:p text:style-name="Text_20_body">ATELIER ENTREPRISE</text:p>
      <text:p text:style-name="Text_20_body">12 élèves</text:p>
      <text:p text:style-name="Text_20_body">Départ :</text:p>
      <text:h text:style-name="Heading_20_3" text:outline-level="3">Chanson Entreprise</text:h>
      <text:p text:style-name="Text_20_body">Puis brainstorming :</text:p>
      <text:list xml:id="list5446513682231420227" text:style-name="L6">
        <text:list-item>
          <text:p text:style-name="P5">ce qui aide une équipe ;</text:p>
        </text:list-item>
        <text:list-item>
          <text:p text:style-name="P5">ce qui fragilise une équipe.</text:p>
        </text:list-item>
      </text:list>
      <text:h text:style-name="Heading_20_1" text:outline-level="1">14h55 – 15h30</text:h>
      <text:h text:style-name="Heading_20_2" text:outline-level="2">Rotation 2</text:h>
      <text:p text:style-name="Text_20_body">Inversion des groupes.</text:p>
      <text:p text:style-name="Text_20_body">Chaque élève fait :</text:p>
      <text:list xml:id="list533362735854838811" text:style-name="L7">
        <text:list-item>
          <text:p text:style-name="P6">PRISMELEC</text:p>
        </text:list-item>
        <text:list-item>
          <text:p text:style-name="P6">Entreprise</text:p>
        </text:list-item>
        <text:list-item>
          <text:p text:style-name="P6"/>
        </text:list-item>
      </text:list>
      <text:h text:style-name="Heading_20_1" text:outline-level="1"/>
      <text:h text:style-name="Heading_20_1" text:outline-level="1">15h30 – 15h40</text:h>
      <text:h text:style-name="Heading_20_2" text:outline-level="2">Retour rapide avant récréation</text:h>
      <text:p text:style-name="Text_20_body">Fred</text:p>
      <text:p text:style-name="Text_20_body">Question unique :</text:p>
      <text:p text:style-name="Quotations">Si vous deviez retenir une idée pour l'instant, laquelle serait-ce ?</text:p>
      <text:p text:style-name="Text_20_body">Pas de débat.</text:p>
      <text:p text:style-name="Text_20_body">Juste quelques réponses.</text:p>
      <text:h text:style-name="Heading_20_1" text:outline-level="1">15h40 – 16h10</text:h>
      <text:h text:style-name="Heading_20_2" text:outline-level="2">Récréation</text:h>
      <text:h text:style-name="Heading_20_1" text:outline-level="1"/>
      <text:p text:style-name="Text_20_body"/>
      <text:p text:style-name="Text_20_body"/>
      <text:h text:style-name="Heading_20_1" text:outline-level="1"><text:soft-page-break/>16h10 – 16h20</text:h>
      <text:h text:style-name="Heading_20_2" text:outline-level="2">Mise en commun</text:h>
      <text:p text:style-name="Text_20_body">Fred + Mickaël</text:p>
      <text:p text:style-name="Text_20_body">Au tableau :</text:p>
      <text:h text:style-name="Heading_20_3" text:outline-level="3">Ce qui existe dans la classe</text:h>
      <text:h text:style-name="Heading_20_3" text:outline-level="3">Ce qui existe dans l'entreprise</text:h>
      <text:p text:style-name="Text_20_body">Faire émerger :</text:p>
      <text:list xml:id="list7724011723465481400" text:style-name="L8">
        <text:list-item>
          <text:p text:style-name="P7">communication ;</text:p>
        </text:list-item>
        <text:list-item>
          <text:p text:style-name="P7">confiance ;</text:p>
        </text:list-item>
        <text:list-item>
          <text:p text:style-name="P7">respect ;</text:p>
        </text:list-item>
        <text:list-item>
          <text:p text:style-name="P7">règles ;</text:p>
        </text:list-item>
        <text:list-item>
          <text:p text:style-name="P7">entraide ;</text:p>
        </text:list-item>
        <text:list-item>
          <text:p text:style-name="P7">gestion des tensions ;</text:p>
        </text:list-item>
        <text:list-item>
          <text:p text:style-name="P7">rôle du collectif.</text:p>
        </text:list-item>
      </text:list>
      <text:p text:style-name="Text_20_body">Conclusion :</text:p>
      <text:p text:style-name="Quotations">Les situations changent.</text:p>
      <text:p text:style-name="Quotations">Les mécanismes humains restent souvent les mêmes.</text:p>
      <text:h text:style-name="Heading_20_1" text:outline-level="1">16h20 – 16h50</text:h>
      <text:h text:style-name="Heading_20_2" text:outline-level="2">Planche situation 15 « ce qui nous fait réfléchir »</text:h>
      <text:h text:style-name="Heading_20_2" text:outline-level="2"><text:line-break/>Mon impact sur la classe</text:h>
      <text:p text:style-name="Text_20_body">Travail individuel.</text:p>
      <text:p text:style-name="Text_20_body">Consigne :</text:p>
      <text:p text:style-name="Quotations">Parmi tout ce que nous avons vu aujourd'hui, qu'est-ce qui te concerne le plus personnellement ?</text:p>
      <text:p text:style-name="Text_20_body">Silence.</text:p>
      <text:p text:style-name="Text_20_body">Réflexion.</text:p>
      <text:h text:style-name="Heading_20_1" text:outline-level="1">16h50 – 17h00</text:h>
      <text:h text:style-name="Heading_20_2" text:outline-level="2">Préparation du slam</text:h>
      <text:p text:style-name="Text_20_body">6 groupes.</text:p>
      <text:p text:style-name="Text_20_body">Chaque groupe reçoit un angle différent.</text:p>
      <text:h text:style-name="Heading_20_3" text:outline-level="3">Groupe 1</text:h>
      <text:p text:style-name="Text_20_body">Ce qui nous a surpris</text:p>
      <text:h text:style-name="Heading_20_3" text:outline-level="3">Groupe 2</text:h>
      <text:p text:style-name="Text_20_body">Ce que nous n'avions jamais vu</text:p>
      <text:h text:style-name="Heading_20_3" text:outline-level="3"><text:soft-page-break/>Groupe 3</text:h>
      <text:p text:style-name="Text_20_body">Ce qui peut faire basculer une situation</text:p>
      <text:h text:style-name="Heading_20_3" text:outline-level="3">Groupe 4</text:h>
      <text:p text:style-name="Text_20_body">Ce qui aide un groupe</text:p>
      <text:h text:style-name="Heading_20_3" text:outline-level="3">Groupe 5</text:h>
      <text:p text:style-name="Text_20_body">Ce qui existe aussi dans l'entreprise</text:p>
      <text:h text:style-name="Heading_20_3" text:outline-level="3">Groupe 6</text:h>
      <text:p text:style-name="Text_20_body">Ce que nous retiendrons</text:p>
      <text:p text:style-name="Text_20_body">Consigne :</text:p>
      <text:p text:style-name="Text_20_body">Produire :</text:p>
      <text:list xml:id="list2535925629079793349" text:style-name="L9">
        <text:list-item>
          <text:p text:style-name="P8">une phrase ;</text:p>
        </text:list-item>
        <text:list-item>
          <text:p text:style-name="P8">maximum 15 mots ;</text:p>
        </text:list-item>
        <text:list-item>
          <text:p text:style-name="P8">pas de morale ;</text:p>
        </text:list-item>
        <text:list-item>
          <text:p text:style-name="P8">pas de slogan.</text:p>
        </text:list-item>
      </text:list>
      <text:p text:style-name="Text_20_body">Une découverte.</text:p>
      <text:p text:style-name="Text_20_body"/>
      <text:p text:style-name="Text_20_body"/>
      <text:h text:style-name="Heading_20_1" text:outline-level="1">17h00 – 17h25</text:h>
      <text:h text:style-name="Heading_20_2" text:outline-level="2">Construction du slam</text:h>
      <text:p text:style-name="Text_20_body">Fred collecte.</text:p>
      <text:p text:style-name="Text_20_body">Mickaël écrit au tableau.</text:p>
      <text:p text:style-name="Text_20_body">Les phrases sont mises dans un ordre logique.</text:p>
      <text:p text:style-name="Text_20_body">Exemple :</text:p>
      <text:p text:style-name="Quotations">Nous n'avions pas vu que chacun regarde la situation à sa manière.</text:p>
      <text:p text:style-name="Quotations">Derrière une réaction, il y a parfois quelque chose que l'on ne voit pas.</text:p>
      <text:p text:style-name="Quotations">Un groupe peut faire monter ou apaiser une situation.</text:p>
      <text:p text:style-name="Quotations">Les règles ne servent pas seulement à contraindre.</text:p>
      <text:p text:style-name="Quotations">Dans une entreprise comme dans une classe, personne ne réussit seul.</text:p>
      <text:p text:style-name="Quotations">Comprendre l'autre aide parfois à agir autrement.</text:p>
      <text:h text:style-name="Heading_20_1" text:outline-level="1">17h25– 17h45</text:h>
      <text:h text:style-name="Heading_20_2" text:outline-level="2"><draw:frame draw:style-name="fr1" draw:name="images1" text:anchor-type="paragraph" svg:x="5.588cm" svg:y="-0.042cm" svg:width="6.555cm" svg:height="4.217cm" draw:z-index="0"><draw:image xlink:href="Pictures/1000000000000600000004008B579C21.png" xlink:type="simple" xlink:show="embed" xlink:actuate="onLoad"/></draw:frame>Slam final</text:h>
      <text:p text:style-name="Text_20_body">Lecture collective.</text:p>
      <text:p text:style-name="Text_20_body">Puis conclusion :</text:p>
      <text:p text:style-name="Quotations">Une même situation.</text:p>
      <text:p text:style-name="Quotations">Plusieurs regards.</text:p>
      <text:p text:style-name="Quotations">Rendre l'invisible vi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Sitka Banner Semibold" svg:font-family="'Sitka Banner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23cm" fo:margin-bottom="2cm" fo:margin-left="2cm" fo:margin-right="2cm" style:writing-mode="lr-tb" style:footnote-max-height="0cm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LOYE</meta:initial-creator>
    <meta:creation-date>2026-06-01T08:55:33.43</meta:creation-date>
    <dc:date>2026-06-01T11:53:55.42</dc:date>
    <dc:creator>FRED LOYE</dc:creator>
    <meta:editing-duration>PT2H58M20S</meta:editing-duration>
    <meta:editing-cycles>4</meta:editing-cycles>
    <meta:generator>OpenOffice/4.1.15$Win32 OpenOffice.org_project/4115m2$Build-9813</meta:generator>
    <meta:printed-by>FRED LOYE</meta:printed-by>
    <meta:print-date>2026-06-01T09:45:30.81</meta:print-date>
    <meta:document-statistic meta:table-count="0" meta:image-count="2" meta:object-count="0" meta:page-count="4" meta:paragraph-count="120" meta:word-count="453" meta:character-count="2454"/>
  </office:meta>
</office:document-meta>
</file>