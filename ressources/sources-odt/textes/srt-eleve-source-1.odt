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1<text:line-break/>00:00:00,000 --&gt; 00:00:15,000<text:line-break/>Ouais… Tu vois la MELEC ?<text:line-break/>Laisse-moi t’expliquer<text:line-break/>Frère j’arrive en retard, normal<text:line-break/>Au prof je sors “vie sco”, même moi j’sais c’est bancal<text:line-break/><text:line-break/>2<text:line-break/>00:00:15,000 --&gt; 00:00:26,000<text:line-break/>On traîne devant la salle, on rentre quand on veut<text:line-break/>Le cours il a commencé mais pas pour nous deux<text:line-break/>“Toilettes, infirmerie…” j’lâche ça tranquille<text:line-break/>Si ça bloque, j’me barre, j’vais pas rester docile<text:line-break/><text:line-break/>3<text:line-break/>00:00:26,000 --&gt; 00:00:36,000<text:line-break/>Sac sur l’épaule, j’reviens plus tard<text:line-break/>Et personne voit mon calcul, donc j’recommence<text:line-break/>Les profs parlent de cadre, mais nous on teste<text:line-break/>On voit direct où ça tient, où ça cède<text:line-break/><text:line-break/>4<text:line-break/>00:00:36,000 --&gt; 00:00:48,000<text:line-break/>Rapports, convoc’, sanctions à la chaîne<text:line-break/>Mais le lendemain on revient pareil, sans gêne<text:line-break/>C’est la MELEC, gros, c’est comme ça<text:line-break/>Si tu fais du bruit, tout tourne autour de toi<text:line-break/><text:line-break/>5<text:line-break/>00:00:48,000 --&gt; 00:00:58,000<text:line-break/>C’est la MELEC, retiens bien ça<text:line-break/>Si t’imposes rien… tu comptes pas<text:line-break/>Y'en a qu'essaie de suivre mais sont noyés<text:line-break/>Ça parle trop, ils arrivent plus à accrocher<text:line-break/><text:line-break/>6<text:line-break/>00:00:58,000 --&gt; 00:01:09,000<text:line-break/>Y a des mots qu’ils captent même pas<text:line-break/>Donc j’décroche direct, j’suis plus là<text:line-break/>Trois heures de TP, ça bosse solo<text:line-break/>À côté ça fout rien mais ça fait le show<text:line-break/><text:line-break/>7<text:line-break/>00:01:09,000 --&gt; 00:01:20,000<text:line-break/>Y en a un qui dort, l’autre sur son tel<text:line-break/>Et moi j’me tais… j’veux pas prendre les ailes<text:line-break/>Quand tu piges pas, tu lâches vite<text:line-break/>Et personne voit que t’existes<text:line-break/><text:line-break/>8<text:line-break/>00:01:20,000 --&gt; 00:01:32,000<text:line-break/>T’es là sans être là vraiment<text:line-break/>Perdu dans tout ce bruit constant<text:line-break/>C’est la MELEC, ça crie ça part<text:line-break/>Y en a qui tiennent, y en a qui lâchent<text:line-break/><text:line-break/>9<text:line-break/>00:01:32,000 --&gt; 00:01:42,000<text:line-break/>C’est la MELEC, logique bizarre<text:line-break/>Plus tu déranges… plus t’as d’place<text:line-break/>Les profs font des réunions, appellent les parents<text:line-break/>Ils pensent que ça va changer, mais ça dure longtemps<text:line-break/><text:line-break/>10<text:line-break/></text:span><text:soft-page-break/><text:span text:style-name="Source_20_Text">00:01:42,000 --&gt; 00:01:53,000<text:line-break/>On les voit y croire, ça fait presque rire<text:line-break/>Parce qu’nous on revient, rien à dire<text:line-break/>Trois heures sans rien faire ? Ouais j’assume<text:line-break/>Copie vide mais j’prends toute la lumière, j’allume<text:line-break/><text:line-break/>11<text:line-break/>00:01:53,000 --&gt; 00:02:02,000<text:line-break/>C’est pas que j’sais pas, j’ai juste décidé<text:line-break/>Et ça, personne peut me l’enlever<text:line-break/>Dans la classe c’est comme un concours<text:line-break/>À celui qui ira le plus loin chaque jour<text:line-break/><text:line-break/>12<text:line-break/>00:02:02,000 --&gt; 00:02:15,000<text:line-break/>Tester, pousser, voir craquer<text:line-break/>Et quand ça tient… recommencer<text:line-break/>On pensait qu’après leurs réunions<text:line-break/>Y en aurait qui sauteraient du système<text:line-break/><text:line-break/>13<text:line-break/>00:02:15,000 --&gt; 00:02:25,000<text:line-break/>Mais ils reviennent encore plus forts<text:line-break/>Comme si ça validait le thème<text:line-break/>Une étoile en plus sur l’épaule<text:line-break/>Comme un grade gagné dans l’école<text:line-break/><text:line-break/>14<text:line-break/>00:02:25,000 --&gt; 00:02:35,000<text:line-break/>Plus tu déranges, plus t’existes<text:line-break/>C’est ça la règle qui s’impose<text:line-break/>Pendant qu’au fond y en a qui taffent<text:line-break/>Sans bruit, sans vague, sans place<text:line-break/><text:line-break/>15<text:line-break/>00:02:35,000 --&gt; 00:02:46,000<text:line-break/>Eux avancent mais personne regarde<text:line-break/>Ici faut briller ou disparaître<text:line-break/>Parce qu’un jour ça va partir d’un rien<text:line-break/>Un geste, un mot, un regard malsain<text:line-break/><text:line-break/>16<text:line-break/>00:02:46,000 --&gt; 00:02:56,000<text:line-break/>Et quand ça va vraiment décoller<text:line-break/>Les chaises et les chicots vont voler<text:line-break/>Faudra pas dire qu’on l’avait pas annoncé<text:line-break/>Faudra pas dire que vous le saviez pas<text:line-break/><text:line-break/>17<text:line-break/>00:02:56,000 --&gt; 00:03:21,000<text:line-break/>Faudra pas dire que vous le saviez pas…<text:line-break/>Le jour où tout volera<text:line-break/>Le jour où tout volera<text:line-break/>Le jour où tout vole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5-10T06:37:14.57</meta:creation-date>
    <dc:date>2026-05-10T07:14:47.43</dc:date>
    <dc:creator>FRED LOYE</dc:creator>
    <meta:editing-duration>PT11M2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1" meta:word-count="561" meta:character-count="3158"/>
  </office:meta>
</office:document-meta>
</file>