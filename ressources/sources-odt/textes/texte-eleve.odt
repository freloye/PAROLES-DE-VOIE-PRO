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00000004008B579C21.png"/>
  <manifest:file-entry manifest:media-type="image/png" manifest:full-path="Pictures/100002010000040000000400BACE257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Sitka Banner Semibold" svg:font-family="'Sitka Banner Semibol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text-properties style:font-name="Sitka Banner Semibold"/>
    </style:style>
    <style:style style:name="P2" style:family="paragraph" style:parent-style-name="Text_20_body">
      <style:text-properties style:font-name="Sitka Banner Semibold"/>
    </style:style>
    <style:style style:name="T1" style:family="text">
      <style:text-properties style:font-name="Sitka Banner Semibold"/>
    </style:style>
    <style:style style:name="T2" style:family="text">
      <style:text-properties style:font-name="Sitka Banner Semibold" fo:font-size="18pt" style:font-size-asian="18pt" style:font-size-complex="18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2" draw:name="images2" text:anchor-type="paragraph" svg:x="6.6cm" svg:y="-1.249cm" svg:width="5.962cm" svg:height="5.819cm" draw:z-index="1"><draw:image xlink:href="Pictures/100002010000040000000400BACE257F.png" xlink:type="simple" xlink:show="embed" xlink:actuate="onLoad"/></draw:frame><text:span text:style-name="Strong_20_Emphasis"><text:span text:style-name="T2">LA MELEC (version éléve)</text:span></text:span></text:p>
      <text:h text:style-name="P1" text:outline-level="3">Couplet 1</text:h>
      <text:p text:style-name="P2">Ouais… Tu vois la MELEC ?<text:line-break/>Laisse-moi t’expliquer.</text:p>
      <text:p text:style-name="P2">Frère, j’arrive en retard, normal.<text:line-break/>Au prof je sors « vie sco », même moi je sais que c’est bancal.</text:p>
      <text:p text:style-name="P2">On traîne devant la salle, on rentre quand on veut.<text:line-break/>Le cours a commencé, mais pas pour nous deux.</text:p>
      <text:p text:style-name="P2">« Toilettes, infirmerie… »<text:line-break/>Je lâche ça tranquille.</text:p>
      <text:p text:style-name="P2">Si ça bloque, je me barre,<text:line-break/>Je ne vais pas rester docile.</text:p>
      <text:h text:style-name="P1" text:outline-level="3">Couplet 2</text:h>
      <text:p text:style-name="P2">Sac sur l’épaule, je reviens plus tard.<text:line-break/>Et personne ne voit mon calcul, alors je recommence.</text:p>
      <text:p text:style-name="P2">Les profs parlent de cadre,<text:line-break/>Mais nous, on teste.</text:p>
      <text:p text:style-name="P2">On voit tout de suite où ça tient,<text:line-break/>Où ça cède.</text:p>
      <text:p text:style-name="P2">Rapports, convocations, sanctions à la chaîne,<text:line-break/>Mais le lendemain on revient pareil, sans gêne.</text:p>
      <text:p text:style-name="P2">C’est la MELEC, gros, c’est comme ça.<text:line-break/>Si tu fais du bruit, tout tourne autour de toi.</text:p>
      <text:h text:style-name="P1" text:outline-level="3">Refrain</text:h>
      <text:p text:style-name="P2">C’est la MELEC, retiens bien ça.<text:line-break/>Si tu n’imposes rien, tu ne comptes pas.</text:p>
      <text:p text:style-name="P2">Y en a qui essaient de suivre mais sont noyés.<text:line-break/>Ça parle trop, ils n’arrivent plus à accrocher.</text:p>
      <text:p text:style-name="P2">Y a des mots qu’ils ne captent même pas.<text:line-break/>Alors je décroche direct, je ne suis plus là.</text:p>
      <text:p text:style-name="P2">Trois heures de TP, ça bosse solo.<text:line-break/>À côté, ça ne fait rien mais ça fait le show.</text:p>
      <text:h text:style-name="P1" text:outline-level="3">Couplet 3</text:h>
      <text:p text:style-name="P2">Y en a un qui dort, l’autre sur son téléphone.<text:line-break/>Et moi je me tais, je ne veux pas prendre les ailes.</text:p>
      <text:p text:style-name="P2">Quand tu ne piges pas, tu lâches vite.<text:line-break/>Et personne ne voit que tu existes.</text:p>
      <text:p text:style-name="P2">Tu es là sans être là vraiment,<text:line-break/>Perdu dans tout ce bruit constant.</text:p>
      <text:p text:style-name="P2">C’est la MELEC, ça crie, ça part.<text:line-break/>Y en a qui tiennent, y en a qui lâchent.</text:p>
      <text:h text:style-name="P1" text:outline-level="3"><text:soft-page-break/>Refrain</text:h>
      <text:p text:style-name="P2">C’est la MELEC, logique bizarre.<text:line-break/>Plus tu déranges, plus tu as de place.</text:p>
      <text:p text:style-name="P2">Les profs font des réunions, appellent les parents.<text:line-break/>Ils pensent que ça va changer, mais ça dure longtemps.</text:p>
      <text:p text:style-name="P2">On les voit y croire, ça fait presque rire.<text:line-break/>Parce que nous, on revient, rien à dire.</text:p>
      <text:p text:style-name="P2">Trois heures sans rien faire ?<text:line-break/>Oui, j’assume.</text:p>
      <text:p text:style-name="P2">Copie vide, mais je prends toute la lumière.<text:line-break/>J’allume.</text:p>
      <text:h text:style-name="P1" text:outline-level="3">Couplet 4</text:h>
      <text:p text:style-name="P2">Ce n’est pas que je ne sais pas,<text:line-break/>J’ai juste décidé.</text:p>
      <text:p text:style-name="P2">Et ça, personne ne peut me l’enlever.</text:p>
      <text:p text:style-name="P2">Dans la classe, c’est comme un concours<text:line-break/>À celui qui ira le plus loin chaque jour.</text:p>
      <text:p text:style-name="P2">Tester, pousser, voir craquer.<text:line-break/>Et quand ça tient… recommencer.</text:p>
      <text:p text:style-name="P2">On pensait qu’après leurs réunions,<text:line-break/>Y en aurait qui sauteraient du système.</text:p>
      <text:p text:style-name="P2">Mais ils reviennent encore plus forts,<text:line-break/>Comme si ça validait le thème.</text:p>
      <text:p text:style-name="P2"><draw:frame draw:style-name="fr1" draw:name="images1" text:anchor-type="paragraph" svg:x="5.256cm" svg:y="-0.041cm" svg:width="8.479cm" svg:height="3.896cm" draw:z-index="0"><draw:image xlink:href="Pictures/1000000000000600000004008B579C21.png" xlink:type="simple" xlink:show="embed" xlink:actuate="onLoad"/></draw:frame>Une étoile en plus sur l’épaule,<text:line-break/>Comme un grade gagné dans l’école.</text:p>
      <text:h text:style-name="P1" text:outline-level="3">Pont</text:h>
      <text:p text:style-name="P2">Plus tu déranges, plus tu existes.<text:line-break/>C’est ça la règle qui s’impose.</text:p>
      <text:p text:style-name="P2">Pendant qu’au fond, y en a qui travaillent,<text:line-break/>Sans bruit, sans vague, sans place.</text:p>
      <text:p text:style-name="P2">Eux avancent mais personne ne regarde.</text:p>
      <text:p text:style-name="P2">Ici, il faut briller ou disparaître.</text:p>
      <text:h text:style-name="Heading_20_3" text:outline-level="3">Finale</text:h>
      <text:p text:style-name="Text_20_body">Parce qu’un jour, ça va partir d’un rien.</text:p>
      <text:p text:style-name="Text_20_body">Un geste.<text:line-break/>Un mot.<text:line-break/>Un regard malsain.</text:p>
      <text:p text:style-name="Text_20_body">Et quand ça va vraiment décoller,<text:line-break/>Les chaises et les chicots vont voler.</text:p>
      <text:p text:style-name="Text_20_body">Faudra pas dire qu’on ne l’avait pas annoncé.<text:line-break/>Faudra pas dire que vous ne le saviez pas.</text:p>
      <text:p text:style-name="Text_20_body">Faudra pas dire que vous ne le saviez pas...</text:p>
      <text:p text:style-name="Text_20_body">Le jour où tout volera.</text:p>
      <text:p text:style-name="Text_20_body">Le jour où tout volera.</text:p>
      <text:p text:style-name="Text_20_body">Le jour où tout vole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Sitka Banner Semibold" svg:font-family="'Sitka Banner Semibol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0cm">
          <style:column style:rel-width="7285*" fo:start-indent="0cm" fo:end-indent="0cm"/>
          <style:column style:rel-width="7285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ED LOYE</meta:initial-creator>
    <meta:creation-date>2026-06-01T08:55:33.43</meta:creation-date>
    <meta:document-statistic meta:table-count="0" meta:image-count="2" meta:object-count="0" meta:page-count="2" meta:paragraph-count="51" meta:word-count="536" meta:character-count="2816"/>
    <dc:date>2026-06-01T09:02:20.42</dc:date>
    <dc:creator>FRED LOYE</dc:creator>
    <meta:editing-duration>PT6M47S</meta:editing-duration>
    <meta:editing-cycles>1</meta:editing-cycles>
    <meta:generator>OpenOffice/4.1.15$Win32 OpenOffice.org_project/4115m2$Build-9813</meta:generator>
  </office:meta>
</office:document-meta>
</file>