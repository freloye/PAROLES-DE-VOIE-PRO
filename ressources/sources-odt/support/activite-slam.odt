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00000004008B579C21.png"/>
  <manifest:file-entry manifest:media-type="image/png" manifest:full-path="Pictures/100002010000040000000400BACE257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Sitka Banner Semibold" svg:font-family="'Sitka Banner Semi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style:font-name="Sitka Banner Semibold"/>
    </style:style>
    <style:style style:name="P2" style:family="paragraph" style:parent-style-name="Heading_20_2">
      <style:paragraph-properties fo:background-color="#cfe7f5">
        <style:background-image/>
      </style:paragraph-properties>
    </style:style>
    <style:style style:name="P3" style:family="paragraph" style:parent-style-name="Text_20_body">
      <style:text-properties style:font-name="Sitka Banner Semi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/>
    </style:style>
    <style:style style:name="T1" style:family="text">
      <style:text-properties style:font-name="Sitka Banner Semibold"/>
    </style:style>
    <style:style style:name="T2" style:family="text">
      <style:text-properties style:font-name="Sitka Banner Semibold" fo:font-size="18pt" style:font-size-asian="18pt" style:font-size-complex="1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draw:frame draw:style-name="fr1" draw:name="images2" text:anchor-type="paragraph" svg:x="8.948cm" svg:y="-0.303cm" svg:width="3.717cm" svg:height="3.371cm" draw:z-index="1"><draw:image xlink:href="Pictures/100002010000040000000400BACE257F.png" xlink:type="simple" xlink:show="embed" xlink:actuate="onLoad"/></draw:frame>ANGLE MORT le Slam</text:h>
      <text:h text:style-name="Heading_20_3" text:outline-level="3">Ce qui nous a fait réfléchir aujourd'hui</text:h>
      <text:p text:style-name="Text_20_body">Au centre :</text:p>
      <text:p text:style-name="Quotations"><text:span text:style-name="Strong_20_Emphasis">Si vous ne deviez retenir qu'une seule idée de cet après-midi, laquelle choisiriez-vous ?</text:span></text:p>
      <text:p text:style-name="Text_20_body">Puis 6 grands encadrés.</text:p>
      <text:h text:style-name="Heading_20_3" text:outline-level="3">1. CE QUI NOUS A SURPRIS</text:h>
      <text:p text:style-name="Text_20_body">Nous pensions que :</text:p>
      <text:p text:style-name="Text_20_body">Nous découvrons que :</text:p>
      <text:h text:style-name="Heading_20_3" text:outline-level="3">2. CE QUE NOUS N'AVIONS JAMAIS VU</text:h>
      <text:p text:style-name="Text_20_body">Avant aujourd'hui :</text:p>
      <text:p text:style-name="Text_20_body">Maintenant :</text:p>
      <text:h text:style-name="Heading_20_3" text:outline-level="3">3. CE QUI PEUT FAIRE BASCULER UNE SITUATION</text:h>
      <text:p text:style-name="Text_20_body">Une situation devient plus difficile quand :</text:p>
      <text:p text:style-name="Text_20_body"/>
      <text:h text:style-name="Heading_20_3" text:outline-level="3">4. CE QUI AIDE UN GROUPE</text:h>
      <text:p text:style-name="Text_20_body">Un groupe fonctionne mieux quand :</text:p>
      <text:p text:style-name="Text_20_body"/>
      <text:p text:style-name="Text_20_body"/>
      <text:h text:style-name="Heading_20_3" text:outline-level="3">5. CE QUI EXISTE AUSSI DANS L'ENTREPRISE</text:h>
      <text:p text:style-name="Text_20_body">Nous retrouvons également cela :</text:p>
      <text:p text:style-name="Text_20_body"/>
      <text:h text:style-name="Heading_20_3" text:outline-level="3">6. CE QUE NOUS RETIENDRONS</text:h>
      <text:p text:style-name="Text_20_body">Notre phrase pour le slam :</text:p>
      <text:p text:style-name="Text_20_body"/>
      <text:p text:style-name="Text_20_body">la <text:span text:style-name="Strong_20_Emphasis">planche finale officielle PRISMELEC / ANGLE MORT</text:span>, celle qui clôture systématiquement toutes les futures interventions.</text:p>
      <text:p text:style-name="Quotations">Une même situation.</text:p>
      <text:p text:style-name="Quotations">Plusieurs regards.</text:p>
      <text:p text:style-name="Quotations">Rendre l'invisible visible.</text:p>
      <text:p text:style-name="Horizontal_20_Line"/>
      <text:p text:style-name="Text_20_body">L'avantage est énorme :</text:p>
      <text:list xml:id="list2360519342919666616" text:style-name="L1">
        <text:list-item>
          <text:p text:style-name="P5">les élèves écrivent avant de slammer ; </text:p>
        </text:list-item>
        <text:list-item>
          <text:p text:style-name="P5">les idées sont naturellement différentes ; </text:p>
        </text:list-item>
        <text:list-item>
          <text:p text:style-name="P5">tu conserves une trace papier ; </text:p>
          <text:p text:style-name="P5"/>
        </text:list-item>
        <text:list-item>
          <text:p text:style-name="P4">le slam devient la conséquence du travail et non une activité séparée. </text:p>
        </text:list-item>
      </text:list>
      <text:p text:style-name="Text_20_body">Je pense même que cette planche pourrait devenir l</text:p>
      <text:p text:style-name="Text_20_body"><draw:frame draw:style-name="fr1" draw:name="images1" text:anchor-type="paragraph" svg:x="8.303cm" svg:y="0.164cm" svg:width="4.669cm" svg:height="3.298cm" draw:z-index="0"><draw:image xlink:href="Pictures/1000000000000600000004008B579C21.png" xlink:type="simple" xlink:show="embed" xlink:actuate="onLoad"/></draw:frame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Sitka Banner Semibold" svg:font-family="'Sitka Banner Semi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23cm" fo:margin-bottom="2cm" fo:margin-left="2cm" fo:margin-right="2cm" style:writing-mode="lr-tb" style:footnote-max-height="0cm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ED LOYE</meta:initial-creator>
    <meta:creation-date>2026-06-01T08:55:33.43</meta:creation-date>
    <dc:date>2026-06-01T09:21:03.53</dc:date>
    <dc:creator>FRED LOYE</dc:creator>
    <meta:editing-duration>PT25M29S</meta:editing-duration>
    <meta:editing-cycles>3</meta:editing-cycles>
    <meta:generator>OpenOffice/4.1.15$Win32 OpenOffice.org_project/4115m2$Build-9813</meta:generator>
    <meta:printed-by>FRED LOYE</meta:printed-by>
    <meta:print-date>2026-06-01T09:21:00.64</meta:print-date>
    <meta:document-statistic meta:table-count="0" meta:image-count="2" meta:object-count="0" meta:page-count="1" meta:paragraph-count="29" meta:word-count="180" meta:character-count="1030"/>
  </office:meta>
</office:document-meta>
</file>