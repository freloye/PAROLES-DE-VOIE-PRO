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8B579C21.png"/>
  <manifest:file-entry manifest:media-type="image/png" manifest:full-path="Pictures/100002010000040000000400BACE2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Bookman Old Style"/>
    </style:style>
    <style:style style:name="P2" style:family="paragraph" style:parent-style-name="Heading_20_2">
      <style:text-properties style:font-name="Bookman Old Style"/>
    </style:style>
    <style:style style:name="T1" style:family="text">
      <style:text-properties style:font-name="Sitka Banner Semibold"/>
    </style:style>
    <style:style style:name="T2" style:family="text">
      <style:text-properties style:font-name="Sitka Banner Semibold" fo:font-size="18pt" style:font-size-asian="18pt" style:font-size-complex="18pt"/>
    </style:style>
    <style:style style:name="T3" style:family="text">
      <style:text-properties style:font-name="Sitka Banner Semibold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Bookman Old Style" fo:font-size="22pt" style:font-size-asian="22pt" style:font-size-complex="22pt"/>
    </style:style>
    <style:style style:name="T7" style:family="text">
      <style:text-properties style:font-name="Bookman Old Style"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s2" text:anchor-type="paragraph" svg:x="6.6cm" svg:y="-1.249cm" svg:width="5.962cm" svg:height="5.819cm" draw:z-index="0"><draw:image xlink:href="Pictures/100002010000040000000400BACE257F.png" xlink:type="simple" xlink:show="embed" xlink:actuate="onLoad"/></draw:frame><text:span text:style-name="Strong_20_Emphasis"><text:span text:style-name="T6">Le Chef d'équipe</text:span></text:span></text:h>
      <text:h text:style-name="P2" text:outline-level="2">Introduction</text:h>
      <text:p text:style-name="P1">Il est huit heures dix.</text:p>
      <text:p text:style-name="P1">Je connais déjà la journée.</text:p>
      <text:p text:style-name="P1">Les gars sont là.<text:line-break/>Les outils sont là.<text:line-break/>La camionnette est prête.</text:p>
      <text:p text:style-name="P1">Le client attend.</text:p>
      <text:p text:style-name="P1">Et moi...</text:p>
      <text:p text:style-name="P1">j’attends encore quelqu’un.</text:p>
      <text:h text:style-name="P2" text:outline-level="2">Couplet 1</text:h>
      <text:p text:style-name="P1">Je regarde l’horloge<text:line-break/>toutes les deux minutes.</text:p>
      <text:p text:style-name="P1">Personne ne dit rien,<text:line-break/>mais tout le monde regarde la porte.</text:p>
      <text:p text:style-name="P1">Les cafés refroidissent.<text:line-break/>Les blagues du matin disparaissent.</text:p>
      <text:p text:style-name="P1">Et je sais déjà<text:line-break/>qu’on démarre de travers.</text:p>
      <text:p text:style-name="P1">Ce n’est pas dix minutes qui m’inquiètent.</text:p>
      <text:p text:style-name="P1">C’est de ne pas savoir.</text:p>
      <text:p text:style-name="P1">Est-ce qu’il arrive ?<text:line-break/>Est-ce qu’il a un problème ?<text:line-break/>Est-ce qu’il est simplement en retard ?</text:p>
      <text:p text:style-name="P1">Le téléphone reste silencieux.</text:p>
      <text:p text:style-name="P1">Et moi,<text:line-break/>je cherche une réponse<text:line-break/>que je n’ai pas.</text:p>
      <text:h text:style-name="P2" text:outline-level="2">Refrain</text:h>
      <text:p text:style-name="P1">Et ça monte doucement...</text:p>
      <text:p text:style-name="P1">Pas assez pour casser l’équipe.</text:p>
      <text:p text:style-name="P1">Juste assez<text:line-break/>pour changer les regards.</text:p>
      <text:p text:style-name="P1">Les phrases deviennent plus courtes.</text:p>
      <text:p text:style-name="P1">La confiance ralentit un peu.</text:p>
      <text:p text:style-name="P1">Personne ne cherche le conflit.</text:p>
      <text:p text:style-name="P1">Mais tout le monde sent<text:line-break/>que quelque chose s’est déplacé.</text:p>
      <text:h text:style-name="P2" text:outline-level="2">Couplet 2</text:h>
      <text:p text:style-name="P1">Le client appelle déjà.</text:p>
      <text:p text:style-name="P1">Je réponds comme je peux.</text:p>
      <text:p text:style-name="P1">« On arrive. »</text:p>
      <text:p text:style-name="P1">Mais au fond,<text:line-break/>je sais que je viens de promettre<text:line-break/>quelque chose que je ne maîtrise plus.</text:p>
      <text:p text:style-name="P1">Puis la porte s’ouvre enfin.</text:p>
      <text:p text:style-name="P1">Pas d’explication.<text:line-break/>Pas un mot.</text:p>
      <text:p text:style-name="P1">Juste un :</text:p>
      <text:p text:style-name="P1">« Ça va...<text:line-break/>j’suis pas en retard de beaucoup. »</text:p>
      <text:p text:style-name="P1"><text:soft-page-break/>Et pendant quelques secondes,</text:p>
      <text:p text:style-name="P1">j’entends davantage le silence<text:line-break/>que les paroles.</text:p>
      <text:p text:style-name="P1">Parce qu’une équipe,<text:line-break/>ce n’est pas seulement des horaires.</text:p>
      <text:p text:style-name="P1">C’est aussi la confiance<text:line-break/>qu’on se prête chaque matin.</text:p>
      <text:h text:style-name="P2" text:outline-level="2">Refrain</text:h>
      <text:p text:style-name="P1">Et ça monte doucement...</text:p>
      <text:p text:style-name="P1">Pas assez pour casser l’équipe.</text:p>
      <text:p text:style-name="P1">Juste assez<text:line-break/>pour fatiguer les bonnes volontés.</text:p>
      <text:p text:style-name="P1">Parce qu’attendre une fois,<text:line-break/>ça arrive.</text:p>
      <text:p text:style-name="P1">Attendre toujours,<text:line-break/>ça finit par laisser des traces.</text:p>
      <text:h text:style-name="P2" text:outline-level="2">Couplet 3</text:h>
      <text:p text:style-name="P1">Sur le chantier,<text:line-break/>les choses reprennent.</text:p>
      <text:p text:style-name="P1">Les outils tournent.<text:line-break/>Le travail avance.</text:p>
      <text:p text:style-name="P1">Puis je vois l’écran s’allumer.</text:p>
      <text:p text:style-name="P1">Juste quelques secondes.</text:p>
      <text:p text:style-name="P1">Juste un message.</text:p>
      <text:p text:style-name="P1">Juste un regard.</text:p>
      <text:p text:style-name="P1">Mais dans notre métier,<text:line-break/>parfois,</text:p>
      <text:p text:style-name="P1">une seconde d’inattention<text:line-break/>est celle qu’on regrette.</text:p>
      <text:p text:style-name="P1">Alors je recadre.</text:p>
      <text:p text:style-name="P1">Calmement.</text:p>
      <text:p text:style-name="P1">Comme hier.</text:p>
      <text:p text:style-name="P1">Comme la semaine dernière.</text:p>
      <text:p text:style-name="P1">Comme toutes les fois<text:line-break/>où j’espère ne plus avoir à le faire.</text:p>
      <text:p text:style-name="P1">Et je vois bien<text:line-break/>que ça agace.</text:p>
      <text:p text:style-name="P1">Je vois bien<text:line-break/>que je passe parfois<text:line-break/>pour le type qui complique tout.</text:p>
      <text:h text:style-name="P2" text:outline-level="2">Pont</text:h>
      <text:p text:style-name="P1">Mais quand je demande d’être à l’heure...</text:p>
      <text:p text:style-name="P1">Ce n’est pas pour contrôler quelqu’un.</text:p>
      <text:p text:style-name="P1">Quand je demande de ranger le téléphone...</text:p>
      <text:p text:style-name="P1">Ce n’est pas pour gagner un combat.</text:p>
      <text:p text:style-name="P1">Je pense au client.</text:p>
      <text:p text:style-name="P1">Je pense aux collègues.</text:p>
      <text:p text:style-name="P1">Je pense à la sécurité.</text:p>
      <text:p text:style-name="P1">Je pense à celui<text:line-break/>qui tient l’échelle.</text:p>
      <text:p text:style-name="P1">À celui qui travaille à côté.</text:p>
      <text:p text:style-name="P1">À celui qui compte sur les autres.</text:p>
      <text:p text:style-name="P1"><text:soft-page-break/>Parce qu’ici,<text:line-break/>on ne travaille jamais vraiment seul.</text:p>
      <text:h text:style-name="P2" text:outline-level="2">Refrain final</text:h>
      <text:p text:style-name="P1">Alors ça redescend doucement...</text:p>
      <text:p text:style-name="P1">Le chantier retrouve son rythme.</text:p>
      <text:p text:style-name="P1">Les consignes circulent.</text:p>
      <text:p text:style-name="P1">Quelqu’un plaisante.</text:p>
      <text:p text:style-name="P1">Quelqu’un sourit enfin.</text:p>
      <text:p text:style-name="P1">La journée n’est pas parfaite.</text:p>
      <text:p text:style-name="P1">Personne n’est parfait.</text:p>
      <text:p text:style-name="P1">Mais une équipe avance mieux</text:p>
      <text:p text:style-name="P1">quand chacun pense un peu</text:p>
      <text:p text:style-name="P1">à ce que les autres vivent.</text:p>
      <text:p text:style-name="P1">Un message.</text:p>
      <text:p text:style-name="P1">Quelques mots.</text:p>
      <text:p text:style-name="P1">Un peu d’attention.</text:p>
      <text:p text:style-name="P1">Parfois...</text:p>
      <text:p text:style-name="P1">c’est tout ce qu’il faut.</text:p>
      <text:h text:style-name="P2" text:outline-level="2">Outro</text:h>
      <text:p text:style-name="P1">Le soleil est plus haut maintenant.</text:p>
      <text:p text:style-name="P1">Le chantier fait son bruit habituel.</text:p>
      <text:p text:style-name="P1">Je regarde l’équipe travailler.</text:p>
      <text:p text:style-name="P1">Et je me dis que demain matin,</text:p>
      <text:p text:style-name="P1">on remontera encore<text:line-break/>dans la même camionnette.</text:p>
      <text:p text:style-name="P1">Alors autant essayer</text:p>
      <text:p text:style-name="P1">de repartir ensemble.</text:p>
      <text:p text:style-name="Text_20_body"><text:span text:style-name="Strong_20_Emphasis"><text:span text:style-name="T7"/></text:span></text:p>
      <text:h text:style-name="Heading_20_2" text:outline-level="2"/>
      <text:p text:style-name="Text_20_body"><draw:frame draw:style-name="fr1" draw:name="images1" text:anchor-type="paragraph" svg:x="1.76cm" svg:y="2.579cm" svg:width="8.618cm" svg:height="5.713cm" draw:z-index="1"><draw:image xlink:href="Pictures/1000000000000600000004008B579C21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23cm" fo:margin-bottom="1.635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6-01T08:55:33.43</meta:creation-date>
    <dc:date>2026-06-01T11:41:07.34</dc:date>
    <dc:creator>FRED LOYE</dc:creator>
    <meta:editing-duration>PT1H37M40S</meta:editing-duration>
    <meta:editing-cycles>3</meta:editing-cycles>
    <meta:generator>OpenOffice/4.1.15$Win32 OpenOffice.org_project/4115m2$Build-9813</meta:generator>
    <meta:printed-by>FRED LOYE</meta:printed-by>
    <meta:print-date>2026-06-01T10:24:20.49</meta:print-date>
    <meta:document-statistic meta:table-count="0" meta:image-count="2" meta:object-count="0" meta:page-count="3" meta:paragraph-count="97" meta:word-count="513" meta:character-count="2974"/>
  </office:meta>
</office:document-meta>
</file>