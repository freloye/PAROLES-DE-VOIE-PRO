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<text:line-break/>00:00:22,000 --&gt; 00:00:38,000<text:line-break/>8h20, retard noté, consigné dans un flux<text:line-break/>Je trace, j'enregistre, mais je n'agis presque plus<text:line-break/>La règle est bien écrite, mais son effet s'efface<text:line-break/>Quand elle est répétée sans jamais laisser trace<text:line-break/><text:line-break/>2<text:line-break/>00:00:38,000 --&gt; 00:00:47,000<text:line-break/>À force de rapports sans réponse lisible<text:line-break/>Je fabrique du normal dans l'anormal visible<text:line-break/>Ce qui devait rester une limite claire<text:line-break/>Devient un seuil mouvant que plus rien ne resserre<text:line-break/><text:line-break/>3<text:line-break/>00:00:47,000 --&gt; 00:00:55,000<text:line-break/>Téléphone sur la table, refus de s'engager<text:line-break/>Je sais que ça s'étend, que ça va s'installer<text:line-break/>Je maintiens dans la classe même quand ça dérive<text:line-break/>Car sortir sans solution, c'est déplacer la rive<text:line-break/><text:line-break/>4<text:line-break/>00:00:55,000 --&gt; 00:01:04,000<text:line-break/>Mais à garder dedans ce qui bloque et diffuse<text:line-break/>Je fragilise ceux qui respectent et qui s'usent<text:line-break/>L'hétérogénéité n'est plus à équilibrer<text:line-break/>Quand elle devient un frein constant à cadrer<text:line-break/><text:line-break/>5<text:line-break/>00:01:04,000 --&gt; 00:01:19,000<text:line-break/>Je maintiens tout le monde, même quand ça vacille<text:line-break/>Je protège le droit, même quand il vacille<text:line-break/>Responsabilité partagée, action déséquilibrée<text:line-break/>Je rends tout acceptable faute de pouvoir trancher<text:line-break/><text:line-break/>6<text:line-break/>00:01:19,000 --&gt; 00:01:37,000<text:line-break/>Montée de tension, insultes, tables déplacées<text:line-break/>Parfois des chaises volent, tout doit être noté<text:line-break/>Je déclenche la chaîne, procédure enclenchée<text:line-break/>Mais le temps du traitement laisse le groupe marqué<text:line-break/><text:line-break/>7<text:line-break/>00:01:37,000 --&gt; 00:01:47,000<text:line-break/>Versions qui divergent, témoins qui s'alignent<text:line-break/>Le réel se dilue dans ce qu'on redessine<text:line-break/>Pendant que j'instruis ce qui doit être prouvé<text:line-break/>Le climat se dégrade sans jamais s'arrêter<text:line-break/><text:line-break/>8<text:line-break/>00:01:47,000 --&gt; 00:01:54,000<text:line-break/>Je sanctionne au cadre, mesuré, encadré<text:line-break/><text:soft-page-break/>Mais sans rupture nette, tout revient se rejouer<text:line-break/>Exclure impose ailleurs une place, une solution<text:line-break/>Et ces relais manquent ou arrivent hors saison<text:line-break/><text:line-break/>9<text:line-break/>00:01:54,000 --&gt; 00:02:01,000<text:line-break/>Alors je temporise, j'ajuste, je limite<text:line-break/>Mais sans effet durable, la répétition s'invite<text:line-break/>La sanction existe mais sans lisibilité<text:line-break/>Elle perd sa portée et sa légitimité<text:line-break/><text:line-break/>10<text:line-break/>00:02:01,000 --&gt; 00:02:17,000<text:line-break/>Je maintiens tout le monde, même quand ça vacille<text:line-break/>Je protège le droit, même quand il vacille<text:line-break/>Responsabilité partagée, action déséquilibrée<text:line-break/>Je rends tout acceptable faute de pouvoir trancher<text:line-break/><text:line-break/>11<text:line-break/>00:02:17,000 --&gt; 00:02:36,000<text:line-break/>À force d'expliquer sans jamais décider<text:line-break/>Je perds en crédibilité<text:line-break/>À force d'inclure sans différencier<text:line-break/>Je laisse le groupe se déséquilibrer<text:line-break/><text:line-break/>12<text:line-break/>00:02:36,000 --&gt; 00:02:52,000<text:line-break/>Je voulais protéger l'accès universel<text:line-break/>Mais j'érode parfois le cadre collectif réel<text:line-break/>Dans cette tension que je n'arrive pas à résoudre<text:line-break/>Je laisse des dérives lentement se coudre<text:line-break/><text:line-break/>13<text:line-break/>00:02:52,000 --&gt; 00:03:00,000<text:line-break/>Certains respectent encore, d'autres ont renoncé<text:line-break/>Pas par incapacité, mais par usure installée<text:line-break/>Le professeur compense, absorbe et répare<text:line-break/>Et moi je valide que la classe repart<text:line-break/><text:line-break/>14<text:line-break/>00:03:00,000 --&gt; 00:03:08,000<text:line-break/>Mais sous cette apparence d'un système qui tient<text:line-break/>Se glisse une fatigue qui n'appartient à rien<text:line-break/>Quand le cadre est connu mais jamais appliqué<text:line-break/>C'est toute l'institution qui finit contestée<text:line-break/><text:line-break/>15<text:line-break/>00:03:08,000 --&gt; 00:03:25,000<text:line-break/>Je maintiens tout le monde, même quand ça vacille<text:line-break/>Je protège le droit, même quand il vacille<text:line-break/>Responsabilité partagée, action déséquilibrée<text:line-break/>Et parfois je le sais, je fabrique la dérive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ED LOYE</meta:initial-creator>
    <meta:creation-date>2026-05-10T07:24:53.57</meta:creation-date>
    <dc:date>2026-05-10T07:48:54.11</dc:date>
    <dc:creator>FRED LOYE</dc:creator>
    <meta:editing-duration>PT23M59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2" meta:paragraph-count="1" meta:word-count="507" meta:character-count="3190"/>
  </office:meta>
</office:document-meta>
</file>